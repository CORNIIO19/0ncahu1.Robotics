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ahnschrift Light SemiCondensed" svg:font-family="'Bahnschrift Light SemiCondensed'" style:font-family-generic="swiss" style:font-pitch="variable"/>
    <style:font-face style:name="Cambria Math" svg:font-family="'Cambria Math'" style:font-family-generic="roman" style:font-pitch="variable"/>
    <style:font-face style:name="Cascadia Mono SemiLight" svg:font-family="'Cascadia Mono SemiLight'"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Verdana" svg:font-family="Verdana" style:font-family-generic="swiss" style:font-pitch="variable"/>
  </office:font-face-decls>
  <office:automatic-styles>
    <style:style style:name="P1" style:family="paragraph" style:parent-style-name="Standard">
      <style:paragraph-properties fo:text-align="justify" style:justify-single-word="false"/>
      <style:text-properties style:font-name="Verdana" fo:font-size="20pt" officeooo:rsid="00059c09" officeooo:paragraph-rsid="00059c09" style:font-size-asian="17.5pt" style:font-size-complex="20pt"/>
    </style:style>
    <style:style style:name="P2" style:family="paragraph" style:parent-style-name="Standard">
      <style:paragraph-properties fo:text-align="justify" style:justify-single-word="false"/>
      <style:text-properties style:font-name="Cambria Math" fo:font-size="12pt" officeooo:rsid="00059c09" officeooo:paragraph-rsid="00059c09" style:font-size-asian="10.5pt" style:font-size-complex="12pt"/>
    </style:style>
    <style:style style:name="P3" style:family="paragraph" style:parent-style-name="Standard">
      <style:paragraph-properties fo:text-align="justify" style:justify-single-word="false"/>
      <style:text-properties style:font-name="Verdana" fo:font-size="20pt" officeooo:rsid="00068cd4" officeooo:paragraph-rsid="00068cd4" style:font-size-asian="17.5pt" style:font-size-complex="20pt"/>
    </style:style>
    <style:style style:name="P4" style:family="paragraph" style:parent-style-name="Standard">
      <style:paragraph-properties fo:text-align="justify" style:justify-single-word="false"/>
      <style:text-properties style:font-name="Cambria Math" fo:font-size="12pt" officeooo:rsid="00068cd4" officeooo:paragraph-rsid="00068cd4" style:font-size-asian="10.5pt" style:font-size-complex="12pt"/>
    </style:style>
    <style:style style:name="P5" style:family="paragraph" style:parent-style-name="Standard">
      <style:paragraph-properties fo:text-align="justify" style:justify-single-word="false"/>
      <style:text-properties style:font-name="Cascadia Mono SemiLight" fo:font-size="16pt" officeooo:rsid="00068cd4" officeooo:paragraph-rsid="00068cd4" style:font-size-asian="14pt" style:font-size-complex="16pt"/>
    </style:style>
    <style:style style:name="P6" style:family="paragraph" style:parent-style-name="Standard">
      <style:paragraph-properties fo:text-align="justify" style:justify-single-word="false"/>
      <style:text-properties style:font-name="Cambria Math" fo:font-size="12pt" officeooo:rsid="0007874d" officeooo:paragraph-rsid="00068cd4" style:font-size-asian="10.5pt" style:font-size-complex="12pt"/>
    </style:style>
    <style:style style:name="P7" style:family="paragraph" style:parent-style-name="Standard">
      <style:paragraph-properties fo:text-align="justify" style:justify-single-word="false"/>
      <style:text-properties style:font-name="Cambria Math" fo:font-size="12pt" officeooo:rsid="00082b60" officeooo:paragraph-rsid="00068cd4" style:font-size-asian="10.5pt" style:font-size-complex="12pt"/>
    </style:style>
    <style:style style:name="P8" style:family="paragraph" style:parent-style-name="Standard">
      <style:paragraph-properties fo:text-align="justify" style:justify-single-word="false"/>
      <style:text-properties style:font-name="Cambria Math" fo:font-size="12pt" officeooo:rsid="00082b60" officeooo:paragraph-rsid="00082b60" style:font-size-asian="10.5pt" style:font-size-complex="12pt"/>
    </style:style>
    <style:style style:name="P9" style:family="paragraph" style:parent-style-name="Standard">
      <style:paragraph-properties fo:text-align="justify" style:justify-single-word="false"/>
      <style:text-properties style:font-name="Cambria Math" fo:font-size="12pt" fo:font-weight="bold" officeooo:rsid="000a0b39" officeooo:paragraph-rsid="000a0b39"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Cambria Math" fo:font-size="12pt" fo:font-weight="normal" officeooo:rsid="000a0b39" officeooo:paragraph-rsid="000a0b3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mbria Math" fo:font-size="12pt" fo:font-weight="bold" officeooo:rsid="000f71e3" officeooo:paragraph-rsid="000f71e3"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Cambria Math" fo:font-size="12pt" fo:font-weight="normal" officeooo:rsid="000b7704" officeooo:paragraph-rsid="000b7704" style:font-size-asian="10.5pt" style:font-weight-asian="normal" style:font-size-complex="12pt" style:font-weight-complex="normal"/>
    </style:style>
    <style:style style:name="P13" style:family="paragraph" style:parent-style-name="Standard" style:list-style-name="L1">
      <style:paragraph-properties fo:text-align="justify" style:justify-single-word="false"/>
      <style:text-properties style:font-name="Cambria Math" fo:font-size="12pt" fo:font-weight="normal" officeooo:rsid="000d0b04" officeooo:paragraph-rsid="000d0b04" style:font-size-asian="10.5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Cambria Math" fo:font-size="12pt" fo:font-weight="normal" officeooo:rsid="000de820" officeooo:paragraph-rsid="000de82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Cambria Math" fo:font-size="12pt" fo:font-weight="normal" officeooo:rsid="000de820" officeooo:paragraph-rsid="000de82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Cambria Math" fo:font-size="12pt" fo:font-weight="normal" officeooo:rsid="000f71e3" officeooo:paragraph-rsid="000f71e3" style:font-size-asian="10.5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style:font-name="Cambria Math" fo:font-size="12pt" fo:font-weight="normal" officeooo:rsid="000f71e3" officeooo:paragraph-rsid="000f71e3" style:font-size-asian="10.5pt" style:font-weight-asian="normal" style:font-size-complex="12pt" style:font-weight-complex="normal"/>
    </style:style>
    <style:style style:name="P18" style:family="paragraph" style:parent-style-name="Standard" style:list-style-name="L2">
      <style:paragraph-properties fo:text-align="justify" style:justify-single-word="false"/>
      <style:text-properties style:font-name="Cambria Math" fo:font-size="12pt" fo:font-weight="normal" officeooo:rsid="0011646f" officeooo:paragraph-rsid="0011646f" style:font-size-asian="10.5pt" style:font-weight-asian="normal" style:font-size-complex="12pt" style:font-weight-complex="normal"/>
    </style:style>
    <style:style style:name="P19" style:family="paragraph" style:parent-style-name="Standard" style:list-style-name="L2">
      <style:paragraph-properties fo:text-align="justify" style:justify-single-word="false"/>
      <style:text-properties style:font-name="Cambria Math" fo:font-size="12pt" fo:font-weight="normal" officeooo:rsid="000de820" officeooo:paragraph-rsid="0011646f"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mbria Math" fo:font-size="12pt" fo:font-weight="normal" officeooo:rsid="000de820" officeooo:paragraph-rsid="0011646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Verdana" fo:font-size="20pt" fo:font-weight="normal" officeooo:rsid="000de820" officeooo:paragraph-rsid="000de820" style:font-size-asian="17.5pt" style:font-weight-asian="normal" style:font-size-complex="20pt" style:font-weight-complex="normal"/>
    </style:style>
    <style:style style:name="P22" style:family="paragraph" style:parent-style-name="Text_20_body">
      <style:paragraph-properties fo:text-align="justify" style:justify-single-word="false"/>
      <style:text-properties style:font-name="Bahnschrift Light SemiCondensed" fo:font-size="12pt" fo:font-weight="normal" officeooo:rsid="000de820" officeooo:paragraph-rsid="000de820" style:font-size-asian="10.5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 fo:font-size="12pt" fo:font-weight="normal" officeooo:rsid="000de820" officeooo:paragraph-rsid="000de820" style:font-size-asian="10.5pt" style:font-weight-asian="normal" style:font-size-complex="12pt" style:font-weight-complex="normal"/>
    </style:style>
    <style:style style:name="T1" style:family="text">
      <style:text-properties officeooo:rsid="000ea20b"/>
    </style:style>
    <style:style style:name="T2" style:family="text">
      <style:text-properties officeooo:rsid="00082b60"/>
    </style:style>
    <style:style style:name="T3" style:family="text">
      <style:text-properties officeooo:rsid="0007874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0b39" style:font-weight-asian="normal" style:font-weight-complex="normal"/>
    </style:style>
    <style:style style:name="T7" style:family="text">
      <style:text-properties style:font-name-asian="Bahnschrift Light SemiCondensed" style:font-size-asian="12pt"/>
    </style:style>
    <style:style style:name="T8" style:family="text">
      <style:text-properties style:font-name="Times New Roman"/>
    </style:style>
    <style:style style:name="T9" style:family="text">
      <style:text-properties fo:font-style="italic"/>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text:span text:style-name="T1">ó</text:span>n taller de Robots</text:p>
      <text:p text:style-name="P1"/>
      <text:p text:style-name="P1">Modelo “mBot2”</text:p>
      <text:p text:style-name="P1"/>
      <text:p text:style-name="P2">Dentro de este documento se encontraran: “observaciones, metodologias, explicaciones de codigo-maquina” para el manejo <text:s/>del <text:s/>robot, con esto podremos ha<text:span text:style-name="T2">b</text:span>arcar desde lo mas basico que puede hacer nuestr<text:span text:style-name="T2">o pequeño compañero</text:span> como seguimientos de linea y el modo sumo, hasta lo mas complicado que se pued<text:span text:style-name="T2">a ejecutar, </text:span>como comandos por voz, y el uso de API’s para poder hacer un modo patrulla y se pueda comunicar con nosotros por medio de mensajes a nuesto telefono.</text:p>
      <text:p text:style-name="P2"/>
      <text:p text:style-name="P3">Parte 1.- “Entender las partes de <text:span text:style-name="T1">mBot2</text:span>”</text:p>
      <text:p text:style-name="P4">Antes de empezar a hacer programas para nuestro <text:span text:style-name="T2">mBot2</text:span>, primero necesitamos entender las piezas que lo componen y como estas actuan entre si en la forma mecanica, para el software necesitamos entender como esta compuesto el cerebro de nuestro pequeño amigo <text:span text:style-name="T2">mBot2</text:span>, una vez entendiendo esto y las funcionalidades y caracteristicas que el tiene, podemos empezar a hacer nuestros primeros programas para el.</text:p>
      <text:p text:style-name="P4"/>
      <text:p text:style-name="P5">Parte <text:span text:style-name="T3">1.1.- Partes Mecanicas</text:span></text:p>
      <text:p text:style-name="P6">En este apartado vamos a comentar sobre todas las partes que componen a nuestro robot, aunque algunas ya las esabemos por el manual de armado, tenemos que tener en cuenta los detalles de ciertas partes importantes, ya que si configuramos algo mal dentro de nuestro codigo, podemos llegar a dañar alguna parte de nuestro <text:span text:style-name="T2">pequeño commpañero</text:span> y queremos evitar esa situacion.</text:p>
      <text:p text:style-name="P7">Las partes que componen a nuestro compañero son las siguientes:</text:p>
      <text:p text:style-name="P8"><text:span text:style-name="T4">Cyberpi</text:span>: <text:span text:style-name="T5">este es el tablero de control principal del mBot2, es compatible con el software de Makeblock (editor de mBlock “estilo scratch”-Python), este aparato cubre desde lo masbasico </text:span><text:span text:style-name="T6">como la codificacion simple, hasta poder pasar a la codificacion de IA, IoT, ciencia de datos e incluso el diseño de interfazes de usuario.</text:span></text:p>
      <text:p text:style-name="P9">Sus especificaciones tecnicas son:</text:p>
      <text:p text:style-name="P10"><draw:frame draw:style-name="fr1" draw:name="Objeto1" text:anchor-type="char" svg:x="-0.074cm" svg:y="0.284cm" svg:width="17.785cm" svg:height="8.13cm" draw:z-index="0"><draw:object xlink:href="../Tabla%20cyberpi%20caracteristicas.ods" xlink:type="simple" xlink:show="embed" xlink:actuate="onLoad"/><draw:image xlink:href="./ObjectReplacements/Object 1" xlink:type="simple" xlink:show="embed" xlink:actuate="onLoad"/></draw:frame></text:p>
      <text:p text:style-name="P11"><text:soft-page-break/>Caracteristicas</text:p>
      <text:p text:style-name="P12">Las caracteristicas que podemos destacar de esta version a las anteriores que ha sacado la marca de Makeblocs son:</text:p>
      <text:list text:style-name="L1">
        <text:list-item>
          <text:p text:style-name="P13">Pantalla a color, la cual proporciona interfaces de usuario faciles de usar para la interacción persona-maquina.</text:p>
        </text:list-item>
        <text:list-item>
          <text:p text:style-name="P13">El sistema CyberOs nos permite ejecutar programas predefinidos, configurar el idioma del sistema y actualizarlo por medio del joystick y los botones fisicos integrados.</text:p>
        </text:list-item>
        <text:list-item>
          <text:p text:style-name="P13">El puerto USB-C sirve como puerto de comunicación y paso de energia atravez de una PC.</text:p>
        </text:list-item>
        <text:list-item>
          <text:p text:style-name="P13">El puerto de modulos electronicos, como su nombre lo dice, es para conectarlo a modulos electrónicos de la marca.</text:p>
        </text:list-item>
        <text:list-item>
          <text:p text:style-name="P13">Un puerto de extension, para conectarse a placas de extensión.</text:p>
        </text:list-item>
        <text:list-item>
          <text:p text:style-name="P14">Multiples sensores integrados, como sensores de luz y giroscopio los cuales proporcionan multiples salidas de datos.</text:p>
        </text:list-item>
        <text:list-item>
          <text:p text:style-name="P14">Cinco LED, los cuales permiten presentar abundantes efectos de luz y los cuales tambien pueden ser reprogramados para lo que se nos ocurra dentro de nuestro codigo.</text:p>
        </text:list-item>
        <text:list-item>
          <text:p text:style-name="P14">Modulos integrado Wi-Fi y Bluetooth, comunicación inalambrica la cual se debe de configurar dentro del codigo que se le cargue a la cyberpi.</text:p>
        </text:list-item>
        <text:list-item>
          <text:p text:style-name="P14">Admite programacion por medio de bloques estilo Scratch o codigo Python dentro de su software “mBlock” en ambos casos se nos incluyen extensiones para las demas caracteristicas y accesorios que vienen aparte, junto con las bibliotecas especificas para el codigo nativo.</text:p>
        </text:list-item>
      </text:list>
      <text:p text:style-name="P15"/>
      <text:p text:style-name="P11">mBot2-Shield: <text:span text:style-name="T5">Esta equipado con un dispositivorecargable incorporando una pila de litio la cual le suministra energia al cyberpi y los demas componentes, con sus puertos de multifuncion tambien le puede suministrar energia a los servos, motores y tiras LED.</text:span></text:p>
      <text:p text:style-name="P16"><text:span text:style-name="T4">Caracteristicas:</text:span>Las caracteriticas de esta parte del mBot2 que podemos destacar son las siguientes:</text:p>
      <text:list text:style-name="L2">
        <text:list-item>
          <text:p text:style-name="P17">Bateria recargable de litio la cual energiza a todo el robot.</text:p>
        </text:list-item>
        <text:list-item>
          <text:p text:style-name="P17">Dos puertos multifunción, utilizados para conectar y accionar no sólo servos sino también las tiras LED.</text:p>
        </text:list-item>
        <text:list-item>
          <text:p text:style-name="P17">Dos servopuertos, utilizados para conectar y controlar los sevos.</text:p>
        </text:list-item>
        <text:list-item>
          <text:p text:style-name="P17">Dos puertos de motor CC (corriente continua), utilizados para conectar y accionar motores de CC.</text:p>
        </text:list-item>
        <text:list-item>
          <text:p text:style-name="P17">Dos puertos de motor codificador, utilizados para conectar y accionar motores codificadores.</text:p>
        </text:list-item>
        <text:list-item>
          <text:p text:style-name="P18">Un puerto Cyberpi, que le permite conectarse facilmente entre el mBot2 y el Cyberpi.</text:p>
        </text:list-item>
        <text:list-item>
          <text:p text:style-name="P19">Admite programacion por medio de bloques estilo Scratch o codigo Python dentro de su software “mBlock” en ambos casos se nos incluyen extensiones para las demas caracteristicas y accesorios que vienen aparte, junto con las bibliotecas especificas para el codigo nativo.</text:p>
        </text:list-item>
      </text:list>
      <text:p text:style-name="P20"/>
      <text:p text:style-name="P21">Bibliografia</text:p>
      <text:p text:style-name="P22"><text:span text:style-name="T7">CyberPi · 语雀. </text:span><text:a xlink:type="simple" xlink:href="https://www.yuque.com/makeblock-help-center-en/cyberpi/cyberpi" text:style-name="Internet_20_link" text:visited-style-name="Visited_20_Internet_20_Link"><text:span text:style-name="T7">https://www.yuque.com/makeblock-help-center-en/cyberpi/cyberpi</text:span></text:a><text:span text:style-name="T8">.</text:span></text:p>
      <text:p text:style-name="P22"><text:span text:style-name="T9">What is mBot Neo/mBot2?</text:span> (n.d.). Makeblock Help Center. <text:a xlink:type="simple" xlink:href="https://support.makeblock.com/hc/en-us/articles/1500006183021-What-is-mBot-Neo-mBot2" text:style-name="Internet_20_link" text:visited-style-name="Visited_20_Internet_20_Link">https://support.makeblock.com/hc/en-us/articles/1500006183021-What-is-mBot-Neo-mBot2</text:a></text:p>
      <text:p text:style-name="P22"><text:span text:style-name="T9">MBot Neo/MBot2 – MakeBlock Help Center</text:span>. (n.d.). <text:a xlink:type="simple" xlink:href="https://support.makeblock.com/hc/en-us/sections/1500001036301-mBot-Neo-mBot2" text:style-name="Internet_20_link" text:visited-style-name="Visited_20_Internet_20_Link">https://support.makeblock.com/hc/en-us/sections/1500001036301-mBot-Neo-mBot2</text:a></text:p>
      <text:p text:style-name="P22"><text:soft-page-break/></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ahnschrift Light SemiCondensed" svg:font-family="'Bahnschrift Light SemiCondensed'" style:font-family-generic="swiss" style:font-pitch="variable"/>
    <style:font-face style:name="Cambria Math" svg:font-family="'Cambria Math'" style:font-family-generic="roman" style:font-pitch="variable"/>
    <style:font-face style:name="Cascadia Mono SemiLight" svg:font-family="'Cascadia Mono SemiLight'"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4T14:05:02.537927700</meta:creation-date>
    <meta:editing-duration>PT27M49S</meta:editing-duration>
    <meta:editing-cycles>3</meta:editing-cycles>
    <meta:generator>LibreOffice/26.2.4.2$Windows_X86_64 LibreOffice_project/0229ac93fcf0d7cbc6376066c6f35021cef002dc</meta:generator>
    <dc:date>2026-06-24T15:02:59.639443900</dc:date>
    <meta:document-statistic meta:table-count="0" meta:image-count="0" meta:object-count="1" meta:page-count="3" meta:paragraph-count="34" meta:word-count="702" meta:character-count="4620" meta:non-whitespace-character-count="3967"/>
  </office:meta>
</office:document-meta>
</file>